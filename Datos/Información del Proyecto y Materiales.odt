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88d2e"/>
    </style:style>
    <style:style style:name="P2" style:family="paragraph" style:parent-style-name="Text_20_body">
      <style:text-properties officeooo:rsid="00088d2e" officeooo:paragraph-rsid="00088d2e"/>
    </style:style>
    <style:style style:name="P3" style:family="paragraph" style:parent-style-name="Text_20_body">
      <style:text-properties officeooo:rsid="00088d2e"/>
    </style:style>
    <style:style style:name="P4" style:family="paragraph" style:parent-style-name="Text_20_body" style:list-style-name="L1">
      <style:paragraph-properties fo:margin-top="0cm" fo:margin-bottom="0cm" style:contextual-spacing="false"/>
      <style:text-properties officeooo:rsid="00088d2e"/>
    </style:style>
    <style:style style:name="P5" style:family="paragraph" style:parent-style-name="Text_20_body" style:list-style-name="L1">
      <style:text-properties officeooo:rsid="00088d2e"/>
    </style:style>
    <style:style style:name="P6" style:family="paragraph" style:parent-style-name="Standard">
      <style:text-properties officeooo:rsid="00088d2e" officeooo:paragraph-rsid="00088d2e"/>
    </style:style>
    <style:style style:name="P7" style:family="paragraph" style:parent-style-name="Standard">
      <style:text-properties fo:font-size="16pt" officeooo:rsid="00093ed2" officeooo:paragraph-rsid="00093ed2" style:font-size-asian="16pt" style:font-size-complex="16pt"/>
    </style:style>
    <style:style style:name="P8" style:family="paragraph" style:parent-style-name="Standard">
      <style:text-properties officeooo:rsid="00093ed2" officeooo:paragraph-rsid="00093ed2"/>
    </style:style>
    <style:style style:name="T1" style:family="text">
      <style:text-properties officeooo:rsid="00088d2e"/>
    </style:style>
    <style:style style:name="T2" style:family="text">
      <style:text-properties fo:font-variant="normal" fo:text-transform="none" fo:color="#64b5f6" loext:opacity="100%" style:text-line-through-style="none" style:text-line-through-type="none" fo:font-family="system-ui, apple-system, blinkmacsystemfont, 'Segoe UI', helvetica, arial, sans-serif, 'Apple Color Emoji', 'Segoe UI Emoji', 'Segoe UI Symbol'" fo:font-size="11.25pt" fo:letter-spacing="normal" fo:font-style="normal" style:text-underline-style="none" fo:font-weight="normal" style:text-blinking="false"/>
    </style:style>
    <style:style style:name="T3" style:family="text">
      <style:text-properties officeooo:rsid="000a594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rabajaremos con el dataset : </text:span><text:a xlink:type="simple" xlink:href="https://www.kaggle.com/datasets/vakhariapujan/avocado-prices-and-sales-volume-2015-2023" text:style-name="Internet_20_link" text:visited-style-name="Visited_20_Internet_20_Link"><text:span text:style-name="T2">https://www.kaggle.com/datasets/vakhariapujan/avocado-prices-and-sales-volume-2015-2023</text:span></text:a></text:p>
      <text:p text:style-name="P1"/>
      <text:p text:style-name="P2">HAB hace una distinción entre bolsas y a granel. A granel generalmente significa que las paltas se venden como piezas individuales y son fácilmente distinguibles por su código PLU. Por eso, el PLU se refiere a una venta a granel. Por otro lado, las bolsas indican un envase pre-empaquetado que contiene un número variable de paltas de distintos tipos de PLU. Por ejemplo, un paquete de seis paltas puede tener 2 unidades del PLU 4046, 3 del PLU 4770 y 1 del PLU 4225. Es decir, las ventas en bolsa no permiten desagregar las ventas por PLU individual.</text:p>
      <text:p text:style-name="P3">Esto te va a servir como nota aclaratoria para el dataset de avocado prices — explica por qué las columnas <text:span text:style-name="Source_20_Text">4046</text:span>, <text:span text:style-name="Source_20_Text">4770</text:span>, <text:span text:style-name="Source_20_Text">4225</text:span> (los PLU) no suman exactamente el <text:span text:style-name="Source_20_Text">Total Volume</text:span> cuando hay ventas en bolsa de por medio.</text:p>
      <text:p text:style-name="P2">El PLU 4046 es el código estándar de la industria para paltas Hass de tamaño pequeño/mediano, y el rango "~3-5 oz" indica el peso aproximado de cada unidad: entre 3 y 5 onzas (más o menos entre 85 y 140 gramos cada palta).</text:p>
      <text:p text:style-name="P3">Es uno de los tres PLU que vas a ver en el dataset de avocado prices:</text:p>
      <text:list text:style-name="L1">
        <text:list-item>
          <text:p text:style-name="P4">4046 → Hass chica/mediana (~3-5 oz) </text:p>
        </text:list-item>
        <text:list-item>
          <text:p text:style-name="P4">4225 → Hass grande (~8-10 oz, más o menos) </text:p>
        </text:list-item>
        <text:list-item>
          <text:p text:style-name="P5">4770 → Hass extra grande (~10+ oz) </text:p>
        </text:list-item>
      </text:list>
      <text:p text:style-name="P3">Estos códigos PLU (Price Look-Up) son los mismos que usan los supermercados en EEUU para identificar el producto en la caja registradora</text:p>
      <text:p text:style-name="P6"/>
      <text:p text:style-name="P6"/>
      <text:p text:style-name="P7">Limpieza y Transformación:</text:p>
      <text:p text:style-name="P8"><text:s/></text:p>
      <text:p text:style-name="P8">Decisiones:</text:p>
      <text:p text:style-name="P8"/>
      <text:p text:style-name="P8">- Nulos No trabajare con bags mas de 23% de datos ausentes. </text:p>
      <text:p text:style-name="P8"/>
      <text:p text:style-name="P8">. Datos a datatime – <text:span text:style-name="T3">ver fotmato.</text:span></text:p>
      <text:p text:style-name="P8"/>
      <text:p text:style-name="P8">- <text:span text:style-name="T3">Todo float porque se focaliza en peso </text:span>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UY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UY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8T13:57:30.597500000</meta:creation-date>
    <dc:date>2026-06-18T17:10:10.928839800</dc:date>
    <meta:editing-duration>PT2H19M30S</meta:editing-duration>
    <meta:editing-cycles>1</meta:editing-cycles>
    <meta:document-statistic meta:table-count="0" meta:image-count="0" meta:object-count="0" meta:page-count="1" meta:paragraph-count="15" meta:word-count="278" meta:character-count="1594" meta:non-whitespace-character-count="1325"/>
    <meta:generator>LibreOffice/26.2.0.3$Windows_X86_64 LibreOffice_project/620$Build-3</meta:generator>
  </office:meta>
</office:document-meta>
</file>